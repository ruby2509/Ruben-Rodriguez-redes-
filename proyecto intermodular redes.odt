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4F00000170298CC66F.png" manifest:media-type="image/png"/>
  <manifest:file-entry manifest:full-path="Pictures/10000001000002410000016752A09026.png" manifest:media-type="image/png"/>
  <manifest:file-entry manifest:full-path="Pictures/10000001000002AE0000011F6A8B2970.png" manifest:media-type="image/png"/>
  <manifest:file-entry manifest:full-path="Pictures/10000001000003800000020D860B6341.png" manifest:media-type="image/png"/>
  <manifest:file-entry manifest:full-path="Pictures/10000001000001B30000005EC4E15C1F.png" manifest:media-type="image/png"/>
  <manifest:file-entry manifest:full-path="Pictures/100000010000021200000051A93D483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66242" officeooo:paragraph-rsid="0017459e"/>
    </style:style>
    <style:style style:name="P2" style:family="paragraph" style:parent-style-name="Text_20_body">
      <style:text-properties officeooo:rsid="001893a4" officeooo:paragraph-rsid="0017459e"/>
    </style:style>
    <style:style style:name="P3" style:family="paragraph" style:parent-style-name="Text_20_body">
      <style:text-properties fo:font-weight="bold" officeooo:rsid="001a423f" officeooo:paragraph-rsid="001a423f" style:font-weight-asian="bold" style:font-weight-complex="bold"/>
    </style:style>
    <style:style style:name="P4" style:family="paragraph" style:parent-style-name="Text_20_body">
      <style:text-properties fo:font-weight="normal" officeooo:rsid="001a423f" officeooo:paragraph-rsid="001a423f" style:font-weight-asian="normal" style:font-weight-complex="normal"/>
    </style:style>
    <style:style style:name="P5" style:family="paragraph" style:parent-style-name="Text_20_body">
      <style:text-properties fo:font-weight="normal" officeooo:rsid="00250c23" officeooo:paragraph-rsid="00250c23" style:font-weight-asian="normal" style:font-weight-complex="normal"/>
    </style:style>
    <style:style style:name="P6" style:family="paragraph" style:parent-style-name="Text_20_body">
      <style:text-properties fo:font-weight="normal" officeooo:rsid="001de0b6" officeooo:paragraph-rsid="001de0b6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1de0b6" officeooo:paragraph-rsid="001de0b6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1f5a8d" officeooo:paragraph-rsid="001f5a8d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30cd48" officeooo:paragraph-rsid="0030cd48" style:font-weight-asian="normal" style:font-weight-complex="normal"/>
    </style:style>
    <style:style style:name="P10" style:family="paragraph" style:parent-style-name="Text_20_body">
      <style:text-properties fo:font-weight="normal" officeooo:rsid="002116cc" officeooo:paragraph-rsid="002116cc" style:font-weight-asian="normal" style:font-weight-complex="normal"/>
    </style:style>
    <style:style style:name="P11" style:family="paragraph" style:parent-style-name="Text_20_body">
      <style:text-properties officeooo:paragraph-rsid="0030cd48"/>
    </style:style>
    <style:style style:name="P12" style:family="paragraph" style:parent-style-name="Text_20_body">
      <style:text-properties officeooo:rsid="0028d8f2" officeooo:paragraph-rsid="00334f25"/>
    </style:style>
    <style:style style:name="P13" style:family="paragraph" style:parent-style-name="Text_20_body">
      <style:text-properties officeooo:rsid="00299350" officeooo:paragraph-rsid="00299350"/>
    </style:style>
    <style:style style:name="P14" style:family="paragraph" style:parent-style-name="Text_20_body">
      <style:text-properties officeooo:rsid="002a184c" officeooo:paragraph-rsid="002a184c"/>
    </style:style>
    <style:style style:name="P15" style:family="paragraph" style:parent-style-name="Text_20_body">
      <style:text-properties officeooo:rsid="002bb087" officeooo:paragraph-rsid="002d2999"/>
    </style:style>
    <style:style style:name="P16" style:family="paragraph" style:parent-style-name="Text_20_body">
      <style:paragraph-properties fo:break-before="page"/>
      <style:text-properties officeooo:rsid="002bb087" officeooo:paragraph-rsid="002d2999"/>
    </style:style>
    <style:style style:name="P17" style:family="paragraph" style:parent-style-name="Text_20_body">
      <style:text-properties officeooo:rsid="002d2999" officeooo:paragraph-rsid="002d2999"/>
    </style:style>
    <style:style style:name="P18" style:family="paragraph" style:parent-style-name="Text_20_body">
      <style:paragraph-properties fo:break-before="page"/>
      <style:text-properties officeooo:rsid="002ec20e" officeooo:paragraph-rsid="002ec20e"/>
    </style:style>
    <style:style style:name="P19" style:family="paragraph" style:parent-style-name="Text_20_body">
      <style:text-properties officeooo:rsid="002ec20e" officeooo:paragraph-rsid="002ec20e"/>
    </style:style>
    <style:style style:name="P20" style:family="paragraph" style:parent-style-name="Text_20_body">
      <style:text-properties officeooo:rsid="002fb15c" officeooo:paragraph-rsid="002fb15c"/>
    </style:style>
    <style:style style:name="T1" style:family="text">
      <style:text-properties officeooo:rsid="001b0930"/>
    </style:style>
    <style:style style:name="T2" style:family="text">
      <style:text-properties officeooo:rsid="00271a01"/>
    </style:style>
    <style:style style:name="T3" style:family="text">
      <style:text-properties officeooo:rsid="002024a9"/>
    </style:style>
    <style:style style:name="T4" style:family="text">
      <style:text-properties officeooo:rsid="0023deaf"/>
    </style:style>
    <style:style style:name="T5" style:family="text">
      <style:text-properties officeooo:rsid="0030cd48"/>
    </style:style>
    <style:style style:name="T6" style:family="text">
      <style:text-properties officeooo:rsid="002116cc"/>
    </style:style>
    <style:style style:name="T7" style:family="text">
      <style:text-properties officeooo:rsid="0028d8f2"/>
    </style:style>
    <style:style style:name="T8" style:family="text">
      <style:text-properties officeooo:rsid="00334f25"/>
    </style:style>
    <style:style style:name="T9" style:family="text">
      <style:text-properties officeooo:rsid="00325ba5"/>
    </style:style>
    <style:style style:name="T10" style:family="text">
      <style:text-properties officeooo:rsid="0033c580"/>
    </style:style>
    <style:style style:name="T11" style:family="text">
      <style:text-properties officeooo:rsid="002fb1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INTERMODULAR</text:p>
      <text:p text:style-name="P2"/>
      <text:p text:style-name="P3">REDES LOCALES (MODULO 0225) : </text:p>
      <text:p text:style-name="P4">en este modulo diseñare la red local de la empresa, <text:span text:style-name="T1">creare la topología de la empresa y haré la configuración de los equipos. </text:span></text:p>
      <text:p text:style-name="P5">Debido a que es una empresa pequeña con tan solo 10 equipos varios trabajadores estarán trabajando en el mismo proyecto por lo que necesitaran <text:span text:style-name="T2">poder compartir archivos entre ellos (como modelos 3d por ejemplo) ademas necesitaran poder acceder a internet. </text:span></text:p>
      <text:p text:style-name="P6">Para crear la topología primero deberemos saber de los equipos con los que cuanta nuestra empresa, en este caso tenemos los siguientes equipos: </text:p>
      <text:list text:style-name="L1">
        <text:list-item>
          <text:p text:style-name="P7"><text:span text:style-name="T3">10</text:span> PCs <text:s/></text:p>
        </text:list-item>
        <text:list-item>
          <text:p text:style-name="P8"><text:span text:style-name="T4">1</text:span> router </text:p>
        </text:list-item>
        <text:list-item>
          <text:p text:style-name="P8"><text:span text:style-name="T5">3</text:span> switche<text:span text:style-name="T6">s</text:span></text:p>
        </text:list-item>
        <text:list-item>
          <text:p text:style-name="P9">1 servidor en la nube </text:p>
        </text:list-item>
      </text:list>
      <text:p text:style-name="P10"/>
      <text:p text:style-name="P10"/>
      <text:p text:style-name="P10">c<draw:frame draw:style-name="fr1" draw:name="Imagen1" text:anchor-type="char" svg:x="0.019cm" svg:y="0.785cm" svg:width="9.673cm" svg:height="6.024cm" draw:z-index="4"><draw:image xlink:href="Pictures/100000010000024F00000170298CC66F.png" xlink:type="simple" xlink:show="embed" xlink:actuate="onLoad" draw:mime-type="image/png"/></draw:frame>on estos equipos la disposición que yo tendría de la red de la empresa <text:span text:style-name="T7">seria la siguiente: </text:span></text:p>
      <text:p text:style-name="P11"/>
      <text:p text:style-name="P12">para establecer direcciones ip en nuestra red local utilizaremos una mascara de sud red: 255.255.255.2<text:span text:style-name="T8">40</text:span> (/2<text:span text:style-name="T8">8</text:span>) ya que con esta mascara tendremos <text:span text:style-name="T8">14 </text:span>host disponibles lo que nos da <text:span text:style-name="T9">la posibilidad de poner todas las redes que necesitamos </text:span>.</text:p>
      <text:p text:style-name="P13">Con esta mascara nuestro rango de direcciones ip sera el siguiente:</text:p>
      <text:p text:style-name="P13">192.168.1.1 /2<text:span text:style-name="T8">8</text:span> – 192.168.1.<text:span text:style-name="T8">14</text:span> /<text:span text:style-name="T9">2</text:span><text:span text:style-name="T8">8</text:span> teniendo como dirección de red la siguiente ip 192.168.1.0 /2<text:span text:style-name="T8">8</text:span> y como dirección de brodcast la dirección 192.168.1.<text:span text:style-name="T8">15</text:span> /2<text:span text:style-name="T8">8</text:span>.</text:p>
      <text:p text:style-name="P14"><text:soft-page-break/>ahora colocaremos las direcciones ip a cada equipo sumando un total de 1<text:span text:style-name="T8">1</text:span> <text:span text:style-name="T9">equipos </text:span>por l<text:span text:style-name="T8">a mascara nos da los host necesarios para nuestra red </text:span></text:p>
      <text:p text:style-name="P15"><draw:frame draw:style-name="fr2" draw:name="Imagen2" text:anchor-type="char" svg:x="0.046cm" svg:y="-0.254cm" svg:width="15.268cm" svg:height="9.499cm" draw:z-index="5"><draw:image xlink:href="Pictures/10000001000002410000016752A09026.png" xlink:type="simple" xlink:show="embed" xlink:actuate="onLoad" draw:mime-type="image/png"/></draw:frame></text:p>
      <text:p text:style-name="P16">una vez establecido como se va a organizar la red local de la empresa vamos a simularla en cisco packet tracer para ver como funcionaria en la vida real. </text:p>
      <text:p text:style-name="P17">L<draw:frame draw:style-name="fr2" draw:name="Imagen3" text:anchor-type="char" svg:x="0.159cm" svg:y="0.818cm" svg:width="17cm" svg:height="10.049cm" draw:z-index="0"><draw:image xlink:href="Pictures/10000001000003800000020D860B6341.png" xlink:type="simple" xlink:show="embed" xlink:actuate="onLoad" draw:mime-type="image/png"/></draw:frame>o primero que haremos sera recrear la red</text:p>
      <text:p text:style-name="P17"/>
      <text:p text:style-name="P17">una vez tengamos todo conectado le asignaremos una dirección ip a los PCs como se muestra en la siguiente imagen, <text:span text:style-name="T10">al ser una empresa pequeña y no tener una cantidad excesiva de equipos he decidido configurar las ip a mano en lugar de hacerlo con DHCP para asegurarme de que no suceda ningún fallo </text:span><text:s/><text:span text:style-name="T10">a la hora de configurar los pools </text:span></text:p>
      <text:p text:style-name="P17"><draw:frame draw:style-name="fr3" draw:name="Imagen4" text:anchor-type="char" svg:width="17cm" svg:height="7.11cm" draw:z-index="1"><draw:image xlink:href="Pictures/10000001000002AE0000011F6A8B2970.png" xlink:type="simple" xlink:show="embed" xlink:actuate="onLoad" draw:mime-type="image/png"/></draw:frame>( se hará igual en el resto de equipos asignando a cada pc su respectiva ip) </text:p>
      <text:p text:style-name="P18">cuando todos los ordenadores tengan una ip asignada configuraremos el router <text:span text:style-name="T11">y comprobaremos si los ordenadores se pueden comunicar haciendo pings.</text:span></text:p>
      <text:p text:style-name="P19"><draw:frame draw:style-name="fr1" draw:name="Imagen5" text:anchor-type="char" svg:x="0.18cm" svg:y="-0.079cm" svg:width="11.509cm" svg:height="2.487cm" draw:z-index="2"><draw:image xlink:href="Pictures/10000001000001B30000005EC4E15C1F.png" xlink:type="simple" xlink:show="embed" xlink:actuate="onLoad" draw:mime-type="image/png"/></draw:frame><draw:frame draw:style-name="fr1" draw:name="Imagen6" text:anchor-type="char" svg:x="0.392cm" svg:y="3.173cm" svg:width="14.025cm" svg:height="2.143cm" draw:z-index="3"><draw:image xlink:href="Pictures/100000010000021200000051A93D4832.png" xlink:type="simple" xlink:show="embed" xlink:actuate="onLoad" draw:mime-type="image/png"/></draw:frame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1" fo:font-weight="normal" officeooo:rsid="0017459e" officeooo:paragraph-rsid="0017459e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én Rodríguez 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11:30:37.924297700</meta:creation-date>
    <meta:editing-duration>PT5H37M18S</meta:editing-duration>
    <meta:editing-cycles>11</meta:editing-cycles>
    <meta:generator>LibreOffice/25.8.1.1$Windows_X86_64 LibreOffice_project/54047653041915e595ad4e45cccea684809c77b5</meta:generator>
    <dc:date>2026-05-21T11:05:58.239969200</dc:date>
    <meta:document-statistic meta:table-count="0" meta:image-count="6" meta:object-count="0" meta:page-count="4" meta:paragraph-count="20" meta:word-count="360" meta:character-count="2090" meta:non-whitespace-character-count="1738"/>
  </office:meta>
</office:document-meta>
</file>